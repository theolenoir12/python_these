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4.826cm"/>
    </style:style>
    <style:style style:name="co4" style:family="table-column">
      <style:table-column-properties fo:break-before="auto" style:column-width="3.82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4" table:default-cell-style-name="Default"/>
        <table:table-row table:style-name="ro1">
          <table:table-cell office:value-type="string" calcext:value-type="string">
            <text:p>learning_rate</text:p>
          </table:table-cell>
          <table:table-cell office:value-type="string" calcext:value-type="string">
            <text:p>window_size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lstm_units</text:p>
          </table:table-cell>
          <table:table-cell office:value-type="string" calcext:value-type="string">
            <text:p>dropout_ra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rmse_val</text:p>
          </table:table-cell>
          <table:table-cell office:value-type="string" calcext:value-type="string">
            <text:p>mae_val</text:p>
          </table:table-cell>
          <table:table-cell office:value-type="string" calcext:value-type="string">
            <text:p>epochs_reached</text:p>
          </table:table-cell>
          <table:table-cell table:number-columns-repeated="1637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,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un_1_ws100_u100_dr0.05</text:p>
          </table:table-cell>
          <table:table-cell office:value-type="float" office:value="0.000312212017168306" calcext:value-type="float">
            <text:p>0,000312212017168306</text:p>
          </table:table-cell>
          <table:table-cell office:value-type="float" office:value="0.000246973146128472" calcext:value-type="float">
            <text:p>0,000246973146128472</text:p>
          </table:table-cell>
          <table:table-cell office:value-type="float" office:value="233" calcext:value-type="float">
            <text:p>233</text:p>
          </table:table-cell>
          <table:table-cell table:number-columns-repeated="1637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un_2_ws100_u100_dr0.1</text:p>
          </table:table-cell>
          <table:table-cell office:value-type="float" office:value="0.0000887730242961862" calcext:value-type="float">
            <text:p>8,87730242961862E-05</text:p>
          </table:table-cell>
          <table:table-cell office:value-type="float" office:value="0.0000758675940878085" calcext:value-type="float">
            <text:p>7,58675940878085E-05</text:p>
          </table:table-cell>
          <table:table-cell office:value-type="float" office:value="189" calcext:value-type="float">
            <text:p>189</text:p>
          </table:table-cell>
          <table:table-cell table:number-columns-repeated="1637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,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un_3_ws100_u150_dr0.05</text:p>
          </table:table-cell>
          <table:table-cell office:value-type="float" office:value="0.000074760981583916" calcext:value-type="float">
            <text:p>7,4760981583916E-05</text:p>
          </table:table-cell>
          <table:table-cell office:value-type="float" office:value="0.0000585944382597664" calcext:value-type="float">
            <text:p>5,85944382597664E-05</text:p>
          </table:table-cell>
          <table:table-cell office:value-type="float" office:value="361" calcext:value-type="float">
            <text:p>361</text:p>
          </table:table-cell>
          <table:table-cell table:number-columns-repeated="1637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un_4_ws100_u150_dr0.1</text:p>
          </table:table-cell>
          <table:table-cell office:value-type="float" office:value="0.000225221660631315" calcext:value-type="float">
            <text:p>0,000225221660631315</text:p>
          </table:table-cell>
          <table:table-cell office:value-type="float" office:value="0.000192934229598021" calcext:value-type="float">
            <text:p>0,000192934229598021</text:p>
          </table:table-cell>
          <table:table-cell office:value-type="float" office:value="288" calcext:value-type="float">
            <text:p>288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5-07T17:58:13</meta:creation-date>
    <dc:date>2026-05-07T20:14:07.407357327</dc:date>
    <meta:generator>LibreOffice/24.2.7.2$Linux_X86_64 LibreOffice_project/420$Build-2</meta:generator>
    <meta:editing-duration>PT2M13S</meta:editing-duration>
    <meta:editing-cycles>1</meta:editing-cycles>
    <meta:document-statistic meta:table-count="1" meta:cell-count="50" meta:object-count="0"/>
    <meta:user-defined meta:name="AppVersion">3.1</meta:user-defined>
  </office:meta>
</office:document-meta>
</file>